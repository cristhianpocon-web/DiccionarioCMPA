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80000014A4673C19E.png" manifest:media-type="image/png"/>
  <manifest:file-entry manifest:full-path="Pictures/10000001000002F5000002769A3D8CB9.png" manifest:media-type="image/png"/>
  <manifest:file-entry manifest:full-path="Pictures/100000010000030C000003C5303114A3.png" manifest:media-type="image/png"/>
  <manifest:file-entry manifest:full-path="Pictures/10000001000002AA000001A584C72474.png" manifest:media-type="image/png"/>
  <manifest:file-entry manifest:full-path="Pictures/10000001000002EA0000020068DACB62.png" manifest:media-type="image/png"/>
  <manifest:file-entry manifest:full-path="Pictures/10000001000002CA000003477592FD7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957" officeooo:paragraph-rsid="000bd9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</text:p>
      <text:p text:style-name="P1">Escribir un programa que guarde en una variable el diccionario {'Euro':'€', 'Dollar':'$',</text:p>
      <text:p text:style-name="P1">'Yen':'¥'}, pregunte al usuario por una divisa y muestre su símbolo o un mensaje de</text:p>
      <text:p text:style-name="P1">aviso si la divisa no está en el diccionario.</text:p>
      <text:p text:style-name="P1">Observación: Agregar al diccionario el Quetzal “Q”</text:p>
      <text:p text:style-name="P1"><draw:frame draw:style-name="fr1" draw:name="Imagen1" text:anchor-type="char" svg:width="16.125cm" svg:height="13.42cm" draw:z-index="0"><draw:image xlink:href="Pictures/10000001000002F5000002769A3D8CB9.png" xlink:type="simple" xlink:show="embed" xlink:actuate="onLoad" draw:mime-type="image/png"/></draw:frame><draw:frame draw:style-name="fr2" draw:name="Imagen2" text:anchor-type="char" svg:x="0.185cm" svg:y="13.732cm" svg:width="16.018cm" svg:height="7.422cm" draw:z-index="1"><draw:image xlink:href="Pictures/10000001000002C80000014A4673C19E.png" xlink:type="simple" xlink:show="embed" xlink:actuate="onLoad" draw:mime-type="image/png"/></draw:frame></text:p>
      <text:p text:style-name="P1"><text:soft-page-break/>Ejercicio2</text:p>
      <text:p text:style-name="P1">Escribir un programa que pregunte al usuario su nombre, edad, dirección y teléfono y</text:p>
      <text:p text:style-name="P1">lo guarde en un diccionario. Después debe mostrar por pantalla el mensaje &lt;nombre&gt;</text:p>
      <text:p text:style-name="P1">tiene &lt;edad&gt; años, vive en &lt;dirección&gt; y su número de teléfono es &lt;teléfono&gt;.</text:p>
      <text:p text:style-name="P1">Observación: Agregar al diccionario que pregunte por su clave.</text:p>
      <text:p text:style-name="P1">Al ejecutar el ejercicio debe realizarlo con sus datos.</text:p>
      <text:p text:style-name="P1"><draw:frame draw:style-name="fr2" draw:name="Imagen3" text:anchor-type="char" svg:x="0cm" svg:y="0.82cm" svg:width="17.59cm" svg:height="18.671cm" draw:z-index="2"><draw:image xlink:href="Pictures/100000010000030C000003C5303114A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4" text:anchor-type="char" svg:width="17.59cm" svg:height="12.072cm" draw:z-index="3"><draw:image xlink:href="Pictures/10000001000002EA0000020068DACB6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3</text:p>
      <text:p text:style-name="P1">Escribir un programa que guarde en un diccionario los precios de las frutas de la</text:p>
      <text:p text:style-name="P1">tabla, pregunte al usuario por una fruta, un número de kilos y muestre por pantalla el</text:p>
      <text:p text:style-name="P1">precio de ese número de kilos de fruta. Si la fruta no está en el diccionario debe</text:p>
      <text:p text:style-name="P1">mostrar un mensaje informando de ello.</text:p>
      <text:p text:style-name="P1"><draw:frame draw:style-name="fr3" draw:name="Imagen5" text:anchor-type="char" svg:width="17.59cm" svg:height="20.667cm" draw:z-index="4"><draw:image xlink:href="Pictures/10000001000002CA000003477592FD7C.png" xlink:type="simple" xlink:show="embed" xlink:actuate="onLoad" draw:mime-type="image/png"/></draw:frame></text:p>
      <text:p text:style-name="P1"><draw:frame draw:style-name="fr3" draw:name="Imagen6" text:anchor-type="char" svg:width="17.59cm" svg:height="10.859cm" draw:z-index="5"><draw:image xlink:href="Pictures/10000001000002AA000001A584C7247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4</text:p>
      <text:p text:style-name="P1">Escribir un programa que pregunte una fecha en formato dd/mm/aaaa y muestre por</text:p>
      <text:p text:style-name="P1">pantalla la misma fecha en formato dd de &lt;mes&gt; de aaaa donde &lt;mes&gt; es el nombre</text:p>
      <text:p text:style-name="P1">del m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5</text:p>
      <text:p text:style-name="P1">Escribir un programa que almacene el diccionario con los créditos de las asignaturas</text:p>
      <text:p text:style-name="P1">de un curso {'Matemáticas': 6, 'Física': 4, 'Química': 5} y después muestre por pantalla</text:p>
      <text:p text:style-name="P1">los créditos de cada asignatura en el formato &lt;asignatura&gt; tiene &lt;créditos&gt; créditos,</text:p>
      <text:p text:style-name="P1">donde &lt;asignatura&gt; es cada una de las asignaturas del curso, y &lt;créditos&gt; son sus</text:p>
      <text:p text:style-name="P1">créditos. Al final debe mostrar también el número total de créditos del curso.</text:p>
      <text:p text:style-name="P1">Observación: Agregar al diccionario los cursos de Análisis de Sistemas 10 créditos y</text:p>
      <text:p text:style-name="P1">Tecnología 10 crédit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6</text:p>
      <text:p text:style-name="P1">Escribir un programa que cree un diccionario vacío y lo vaya llenado con información</text:p>
      <text:p text:style-name="P1">sobre una persona (por ejemplo nombre, edad, sexo, teléfono, correo electrónico,</text:p>
      <text:p text:style-name="P1">etc.) que se le pida al usuario. Cada vez que se añada un nuevo dato debe imprimirse</text:p>
      <text:p text:style-name="P1">el contenido del diccionario.</text:p>
      <text:p text:style-name="P1">Observación: Al ejecutar su ejercicio ingresar su clave, después su nombre y por</text:p>
      <text:p text:style-name="P1">último secció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8T10:56:16.736127600</meta:creation-date>
    <dc:date>2026-05-28T11:16:51.407801100</dc:date>
    <meta:editing-duration>PT10M22S</meta:editing-duration>
    <meta:editing-cycles>1</meta:editing-cycles>
    <meta:document-statistic meta:table-count="0" meta:image-count="6" meta:object-count="0" meta:page-count="8" meta:paragraph-count="35" meta:word-count="335" meta:character-count="2035" meta:non-whitespace-character-count="1735"/>
    <meta:generator>LibreOffice/26.2.0.3$Windows_X86_64 LibreOffice_project/620$Build-3</meta:generator>
  </office:meta>
</office:document-meta>
</file>